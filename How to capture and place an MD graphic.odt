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BE0000063A45B1F8A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1ce063" officeooo:paragraph-rsid="001ce063"/>
    </style:style>
    <style:style style:name="P2" style:family="paragraph" style:parent-style-name="Standard" style:list-style-name="L1">
      <style:text-properties style:font-name="Helvetic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189in, 1.7319in, 1.6272in, 2.010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1.0602in" svg:y="0.0508in" svg:width="5.2728in" svg:height="4.9626in" draw:z-index="0"><draw:image xlink:href="Pictures/10000001000006BE0000063A45B1F8A1.png" xlink:type="simple" xlink:show="embed" xlink:actuate="onLoad" draw:mime-type="image/png"/></draw:frame>How to get this graphic onto a print page (here an .odt, to be transformed to .pdf):</text:p>
      <text:p text:style-name="P1"/>
      <text:list text:style-name="L1">
        <text:list-item>
          <text:p text:style-name="P2">Open Cursor’s .md rendition with QL Markdown</text:p>
        </text:list-item>
        <text:list-item>
          <text:p text:style-name="P2">Export as .html</text:p>
        </text:list-item>
        <text:list-item>
          <text:p text:style-name="P2">Open .html with Chrome</text:p>
        </text:list-item>
        <text:list-item>
          <text:p text:style-name="P2">Take a screenshot, paste it onto the OpenOffice text page and crop to siz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4:29:33.479019307</meta:creation-date>
    <dc:date>2026-05-12T14:47:46.674216657</dc:date>
    <meta:editing-duration>PT6M26S</meta:editing-duration>
    <meta:editing-cycles>2</meta:editing-cycles>
    <meta:generator>LibreOffice/24.8.6.2$MacOSX_AARCH64 LibreOffice_project/6d98ba145e9a8a39fc57bcc76981d1fb1316c60c</meta:generator>
    <meta:document-statistic meta:table-count="0" meta:image-count="1" meta:object-count="0" meta:page-count="1" meta:paragraph-count="5" meta:word-count="49" meta:character-count="247" meta:non-whitespace-character-count="207"/>
  </office:meta>
</office:document-meta>
</file>